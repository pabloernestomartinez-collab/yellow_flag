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22FC0E4E4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/>
    </style:style>
    <style:style style:name="P2" style:family="paragraph" style:parent-style-name="Standard">
      <style:text-properties style:font-name="Liberation Mono"/>
    </style:style>
    <style:style style:name="P3" style:family="paragraph" style:parent-style-name="Standard">
      <style:paragraph-properties fo:break-before="page"/>
      <style:text-properties style:font-name="Liberation Mono"/>
    </style:style>
    <style:style style:name="P4" style:family="paragraph" style:parent-style-name="Standard">
      <style:paragraph-properties fo:text-align="center" style:justify-single-word="false"/>
      <style:text-properties style:font-name="Liberation Mono" officeooo:rsid="000803e7" officeooo:paragraph-rsid="000803e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: YELLOW FLAG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ng. Pablo Martínez</text:p>
      <text:p text:style-name="P4">VII - 2026</text:p>
      <text:p text:style-name="P3">1. INFORMACIÓN GENERAL</text:p>
      <text:p text:style-name="P2">Título del Programa: YELLOW FLAG</text:p>
      <text:p text:style-name="P2">Plataforma: PC (Windows / Mouse y Teclado)</text:p>
      <text:p text:style-name="P2">Género: Simulador Técnico / Software de Capacitación Industrial Interactiva.</text:p>
      <text:p text:style-name="P2">Público Objetivo: Operarios de planta en formación, estudiantes de escuelas técnicas/universidades e ingenieros industriales novatos.</text:p>
      <text:p text:style-name="P2">Tono/Estética: Sobrio, realista, técnico y de alta fidelidad industrial.</text:p>
      <text:p text:style-name="P2"/>
      <text:p text:style-name="P2"/>
      <text:p text:style-name="P3">2. VISIÓN GENERAL Y OBJETIVOS</text:p>
      <text:p text:style-name="P2">El objetivo de YELLOW FLAG es proporcionar un entorno seguro y controlado en PC donde los operarios puedan cometer errores tipográficos, de configuración o de seguridad (levantando una "bandera amarilla") sin dañar maquinaria real ni ponerse en peligro. El foco absoluto está en la precisión procedimental.</text:p>
      <text:p text:style-name="P2"/>
      <text:p text:style-name="P2">Pilares de Diseño:</text:p>
      <text:p text:style-name="P2">Rigurosidad Procedimental: Si el operario olvida un paso de seguridad (ej. cerrar la puerta del torno), el simulador no le permitirá avanzar o generará un fallo crítico.</text:p>
      <text:p text:style-name="P2">Fidelidad Visual y Sonora: El entorno debe verse y sonar como un taller real para fomentar la memoria muscular y el reconocimiento de alarmas.</text:p>
      <text:p text:style-name="P2">Feedback Educativo Directo: Cada error genera una explicación técnica de por qué está mal y qué consecuencias tendría en la vida real.</text:p>
      <text:p text:style-name="P2"/>
      <text:p text:style-name="P2"/>
      <text:p text:style-name="P3">3. MECÁNICAS PRINCIPALES (CORE MECHANICS)</text:p>
      <text:p text:style-name="P2"/>
      <text:p text:style-name="P2">A. Sistema de Interacción y Cámara</text:p>
      <text:p text:style-name="P2">Perspectiva: Cámara en primera persona estática con transiciones fluidas. El usuario no camina por un mapa; en su lugar, alterna entre 3 vistas clave mediante clics o accesos rápidos:</text:p>
      <text:p text:style-name="P2">Vista General: Enfrente del torno, permite interactuar con la puerta y el plato.</text:p>
      <text:p text:style-name="P2">Vista del Panel: Primer plano del controlador CNC (pantalla y botonera).</text:p>
      <text:p text:style-name="P2">Vista de Herramientas: Mesa de trabajo lateral donde se seleccionan insertos y herramientas.</text:p>
      <text:p text:style-name="P2">Interacción: Point-and-Click (Apuntar y hacer clic). El cursor cambia de forma al pasar sobre elementos interactivos (interruptores, perillas, garras del plato).</text:p>
      <text:p text:style-name="P2"/>
      <text:p text:style-name="P2">B. El Panel de Control (UI En el Mundo)</text:p>
      <text:p text:style-name="P2">El panel CNC virtual debe replicar un estándar de la industria (ej. Fanuc Series 0i o similar).</text:p>
      <text:p text:style-name="P2">Teclado Alfanumérico Virtual: El usuario debe hacer clic en las teclas físicas del panel interactivo para introducir datos, no usar el teclado de su PC (para simular la experiencia real).</text:p>
      <text:p text:style-name="P2">Volante Manual (Handwheel): Una perilla interactiva en pantalla para mover los ejes X y Z manualmente en el modo "Jog/Manual".</text:p>
      <text:p text:style-name="P2"/>
      <text:p text:style-name="P2">C. Lógica del Tutorial (Máquina de Estados)</text:p>
      <text:p text:style-name="P2">El sistema guiará al usuario paso a paso bloqueando las interacciones que no correspondan a la etapa actual.</text:p>
      <text:p text:style-name="P2">Sistema de "Banderas" (Alertas):</text:p>
      <text:p text:style-name="P2">Bandera Verde: Acción correcta realizada.</text:p>
      <text:p text:style-name="P2">Bandera Amarilla (Yellow Flag): Error de procedimiento leve (ej. no limpiar el plato antes de montar la pieza). El programa advierte y explica.</text:p>
      <text:p text:style-name="P2">Bandera Roja: Error catastrófico (ej. colisión de la herramienta con el plato por mal cálculo del cero pieza). Fin de la simulación y reporte de daños económicos virtuales.</text:p>
      <text:p text:style-name="P2"/>
      <text:p text:style-name="P2"/>
      <text:p text:style-name="P3">4. FLUJO DE TRABAJO DEL TUTORIAL (MÓDULO 1: Pieza Base)</text:p>
      <text:p text:style-name="P2">Este será el orden de los pasos que programarás en Unity para el primer nivel:</text:p>
      <text:p text:style-name="P2">EPI y Seguridad: El usuario debe hacer clic en sus gafas de seguridad y tapones auditivos en la mesa antes de encender la máquina.</text:p>
      <text:p text:style-name="P2">Encendido: Presionar el interruptor general trasero, soltar la seta de emergencia (E-Stop) y encender el control.</text:p>
      <text:p text:style-name="P2">Referenciado (Home): Llevar los ejes X y Z a sus posiciones de origen de la máquina.</text:p>
      <text:p text:style-name="P2">Montaje del Material: Seleccionar un cilindro de aluminio en bruto, limpiar las garras del plato con aire comprimido (clic) y ajustar la pieza con la llave de garras.</text:p>
      <text:p text:style-name="P2">Seteo de Herramientas (Offset): Montar la herramienta de desbaste en la torreta y tocar la pieza para establecer los ceros del operario (Cero Pieza / G54).</text:p>
      <text:p text:style-name="P2">Carga de Código G: El simulador presentará un bloque de código G sencillo pre-escrito. El usuario deberá revisar líneas clave y presionar "Cycle Start".</text:p>
      <text:p text:style-name="P2">Mecanizado y Supervisión: Observar el proceso a través de la ventana del torno, controlando el potenciómetro de avance (Feed Override) por seguridad.</text:p>
      <text:p text:style-name="P2"/>
      <text:p text:style-name="P2"/>
      <text:p text:style-name="P3">5. DIRECCIÓN DE ARTE Y AUDIO</text:p>
      <text:p text:style-name="P2">Visuales: Modelos 3D con texturas desgastadas pero limpias (metal pulido, pintura industrial gris/verde oliva, grasa en las guías). Interfaz de usuario de la pantalla del CNC idéntica a las pantallas CRT o LCD industriales antiguas (fuentes monoespaciadas verdes o amarillas sobre fondo negro).</text:p>
      <text:p text:style-name="P2"/>
      <text:p text:style-name="P2"><draw:frame draw:style-name="fr1" draw:name="Imagen1" text:anchor-type="char" svg:width="17cm" svg:height="9.28cm" draw:z-index="0"><draw:image xlink:href="Pictures/10000000000004000000022FC0E4E4F4.png" xlink:type="simple" xlink:show="embed" xlink:actuate="onLoad" draw:mime-type="image/png"/></draw:frame></text:p>
      <text:p text:style-name="P2">Audio: El ruido de fondo de un taller de fondo (atenuado). Sonido fuerte del extractor de humo, el choque del refrigerante y el sonido agudo del corte de metal (crucial para que el operario note si las RPM son correctas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4T10:53:47.825775392</meta:creation-date>
    <dc:date>2026-07-04T11:02:35.564266057</dc:date>
    <meta:editing-duration>PT8M49S</meta:editing-duration>
    <meta:editing-cycles>1</meta:editing-cycles>
    <meta:document-statistic meta:table-count="0" meta:image-count="1" meta:object-count="0" meta:page-count="6" meta:paragraph-count="44" meta:word-count="713" meta:character-count="4499" meta:non-whitespace-character-count="3830"/>
    <meta:generator>LibreOffice/24.2.7.2$Linux_X86_64 LibreOffice_project/420$Build-2</meta:generator>
  </office:meta>
</office:document-meta>
</file>